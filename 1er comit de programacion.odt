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2a4" officeooo:paragraph-rsid="00110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Este comit lo subí para darle comienzo al trabajo de creación de juegos para programacion estamos ya buscandi informacion y ya realizando trabajos en el ti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13T11:23:34.944000000</meta:creation-date>
    <dc:date>2026-06-13T11:26:00.787000000</dc:date>
    <meta:editing-duration>PT2M29S</meta:editing-duration>
    <meta:editing-cycles>1</meta:editing-cycles>
    <meta:document-statistic meta:table-count="0" meta:image-count="0" meta:object-count="0" meta:page-count="1" meta:paragraph-count="1" meta:word-count="27" meta:character-count="158" meta:non-whitespace-character-count="131"/>
    <meta:generator>Trio_Office/6.2.8.2$Windows_x86 LibreOffice_project/</meta:generator>
  </office:meta>
</office:document-meta>
</file>